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📄 SportNotes: Documento Maestro de Fuente de Verdad (v1.0)</text:h>
      <text:h text:style-name="Heading_20_2" text:outline-level="2">1. Identidad y Propósito</text:h>
      <text:p text:style-name="Text_20_body"><text:span text:style-name="T1">SportNotes</text:span> es una aplicación de rastreo de partidos en tiempo real (Match Tracker) diseñada para el alto rendimiento deportivo, con un enfoque inicial en <text:span text:style-name="T1">Hockey sobre césped</text:span>. Su objetivo es permitir a periodistas y entrenadores registrar acciones tácticas complejas mediante gestos rápidos (taps y swipes) sin perder de vista el juego.</text:p>
      <text:h text:style-name="Heading_20_2" text:outline-level="2">2. Stack Tecnológico Core</text:h>
      <text:list text:style-name="L1">
        <text:list-item>
          <text:p text:style-name="P1"><text:span text:style-name="T1">Frontend</text:span>: React con Material UI (MUI).</text:p>
        </text:list-item>
        <text:list-item>
          <text:p text:style-name="P1"><text:span text:style-name="T1">Estilos</text:span>: CSS avanzado con enfoque en <text:span text:style-name="T1">Responsive Design</text:span> (Mobile-First) y Viewport dinámico (<text:span text:style-name="Source_20_Text">100dvh</text:span>).</text:p>
        </text:list-item>
        <text:list-item>
          <text:p text:style-name="P1"><text:span text:style-name="T1">Infraestructura</text:span>: Despliegue en Vercel, gestión de paquetes vía npm.</text:p>
        </text:list-item>
        <text:list-item>
          <text:p text:style-name="P1"><text:span text:style-name="T1">Base de Datos</text:span>: Firebase (integración para persistencia de partidos y estadísticas).</text:p>
        </text:list-item>
      </text:list>
      <text:p text:style-name="Horizontal_20_Line"/>
      <text:h text:style-name="Heading_20_2" text:outline-level="2">3. Arquitectura del Layout</text:h>
      <text:p text:style-name="Text_20_body">Para garantizar la estabilidad en tablets y móviles (Portrait y Landscape), el layout se rige por estas reglas:</text:p>
      <text:list text:style-name="L2">
        <text:list-item>
          <text:p text:style-name="P2"><text:span text:style-name="T1">Viewport Lock</text:span>: Contenedor raíz con <text:span text:style-name="Source_20_Text">height: 100dvh</text:span> y <text:span text:style-name="Source_20_Text">overflow: hidden</text:span> para evitar scroll accidental.</text:p>
        </text:list-item>
        <text:list-item>
          <text:p text:style-name="P2"><text:span text:style-name="T1">Distribución</text:span>:</text:p>
          <text:list>
            <text:list-item>
              <text:p text:style-name="P2"><text:span text:style-name="T1">Header</text:span>: Alto fijo, contiene marcador y tiempo.</text:p>
            </text:list-item>
            <text:list-item>
              <text:p text:style-name="P2"><text:span text:style-name="T1">Main (Cancha)</text:span>: <text:span text:style-name="Source_20_Text">flex-grow: 1</text:span>, centrado absoluto. La cancha se adapta con <text:span text:style-name="Source_20_Text">max-height: 100%</text:span> y <text:span text:style-name="Source_20_Text">max-width: 100%</text:span> para no pisar el footer.</text:p>
            </text:list-item>
            <text:list-item>
              <text:p text:style-name="P2"><text:span text:style-name="T1">Footer</text:span>: Alto fijo, contiene botones de acción rápida y acceso a estadísticas.</text:p>
            </text:list-item>
          </text:list>
        </text:list-item>
      </text:list>
      <text:p text:style-name="Horizontal_20_Line"/>
      <text:h text:style-name="Heading_20_2" text:outline-level="2">4. Motor de Interacción (Eventos Táctiles)</text:h>
      <text:p text:style-name="Text_20_body">Este es el componente más crítico. Se ha implementado un detector de bajo nivel para evitar interferencias del navegador:</text:p>
      <text:list text:style-name="L3">
        <text:list-item>
          <text:p text:style-name="P3"><text:span text:style-name="T1">Lógica de Discriminación</text:span>:</text:p>
          <text:list>
            <text:list-item>
              <text:p text:style-name="P3"><text:span text:style-name="T1">Tap Simple</text:span>: Se confirma tras una espera de <text:span text:style-name="T1">200ms</text:span> para asegurar que no viene un segundo toque.</text:p>
            </text:list-item>
            <text:list-item>
              <text:p text:style-name="P3"><text:soft-page-break/><text:span text:style-name="T1">Doble Tap</text:span>: Se activa si ocurren dos toques en menos de <text:span text:style-name="T1">250ms</text:span> dentro de un radio de <text:span text:style-name="T1">15px</text:span>.</text:p>
            </text:list-item>
            <text:list-item>
              <text:p text:style-name="P3"><text:span text:style-name="T1">Swipe</text:span>: Registra dirección y zona geográfica del campo.</text:p>
            </text:list-item>
          </text:list>
        </text:list-item>
        <text:list-item>
          <text:p text:style-name="P3"><text:span text:style-name="T1">Propiedades Críticas</text:span>: Uso de <text:span text:style-name="Source_20_Text">touch-action: none</text:span> y <text:span text:style-name="Source_20_Text">onPointerDown</text:span> para eliminar el lag de 300ms del navegador y bloquear el zoom nativo.</text:p>
        </text:list-item>
      </text:list>
      <text:p text:style-name="Horizontal_20_Line"/>
      <text:h text:style-name="Heading_20_2" text:outline-level="2">5. Reglas de Negocio y Lógica Deportiva</text:h>
      <text:list text:style-name="L4">
        <text:list-item>
          <text:p text:style-name="P4"><text:span text:style-name="T1">Flujo de Gol</text:span>: Modal unificado que solicita <text:span text:style-name="T1">Autor (Número)</text:span> y <text:span text:style-name="T1">Modo</text:span> (Jugada, Córner Corto, Penal) en una sola pantalla con teclado numérico automático.</text:p>
        </text:list-item>
        <text:list-item>
          <text:p text:style-name="P4"><text:span text:style-name="T1">Córner Corto (CC)</text:span>:</text:p>
          <text:list>
            <text:list-item>
              <text:p text:style-name="P4">Se dispara mediante swipe hacia el arco en zonas críticas (23 yardas o área).</text:p>
            </text:list-item>
            <text:list-item>
              <text:p text:style-name="P4"><text:span text:style-name="T1">No Duplicidad</text:span>: Si un gol se marca como 'CC', el sistema no debe incrementar el contador de CC si ya se registró uno previamente como origen de la jugada.</text:p>
            </text:list-item>
          </text:list>
        </text:list-item>
        <text:list-item>
          <text:p text:style-name="P4"><text:span text:style-name="T1">Zonas Geográficas</text:span>: El campo discrimina entre lado local/visitante y áreas para habilitar opciones especiales (CC/Penal).</text:p>
        </text:list-item>
      </text:list>
      <text:p text:style-name="Horizontal_20_Line"/>
      <text:h text:style-name="Heading_20_2" text:outline-level="2">6. Sistema de Feedback Visual (UX)</text:h>
      <text:list text:style-name="L5">
        <text:list-item>
          <text:p text:style-name="P5"><text:span text:style-name="T1">Resplandor (Ripple)</text:span>: Efecto visual instantáneo en las coordenadas exactas del toque.</text:p>
        </text:list-item>
        <text:list-item>
          <text:p text:style-name="P5"><text:span text:style-name="T1">Floating Badges</text:span>: Notificación emergente que muestra: <text:span text:style-name="T1">[Ícono] + [Acción] + [Total Acumulado]</text:span>.</text:p>
          <text:list>
            <text:list-item>
              <text:p text:style-name="P5"><text:span text:style-name="T1">Inteligencia de Bordes</text:span>: Si el tap es arriba, el badge flota abajo; si es en un lateral, se ajusta para no cortarse.</text:p>
            </text:list-item>
          </text:list>
        </text:list-item>
        <text:list-item>
          <text:p text:style-name="P5"><text:span text:style-name="T1">Modales</text:span>: Todos los diálogos de decisión deben estar <text:span text:style-name="T1">centrados en pantalla</text:span>, no anclados al tap.</text:p>
        </text:list-item>
      </text:list>
      <text:p text:style-name="Horizontal_20_Line"/>
      <text:h text:style-name="Heading_20_2" text:outline-level="2">7. Reporting y Estadísticas</text:h>
      <text:list text:style-name="L6">
        <text:list-item>
          <text:p text:style-name="P6"><text:span text:style-name="T1">Paridad de Datos</text:span>: Las estadísticas mostradas deben ser idénticas en todos los dispositivos. No se oculta información del rival en móviles, solo se adapta el layout (scroll vertical o grilla de 1 columna).</text:p>
        </text:list-item>
        <text:list-item>
          <text:p text:style-name="P6"><text:span text:style-name="T1">Métricas Core</text:span>: Goles, Remates (sin desglose por sectores), Córners Cortos, Pérdidas, Recuperos y Faltas.</text:p>
        </text:list-item>
        <text:list-item>
          <text:p text:style-name="P6"><text:span text:style-name="T1">Dashboard</text:span>: Acceso a juegos guardados mediante un sistema de <text:span text:style-name="T1">Accordion</text:span>.</text:p>
          <text:list>
            <text:list-item>
              <text:p text:style-name="P6"><text:span text:style-name="T1">Acciones en Accordion</text:span>: Ver estadísticas, Reutilizar, Compartir, Favorito y Eliminar.</text:p>
            </text:list-item>
            <text:list-item>
              <text:p text:style-name="P6"><text:soft-page-break/><text:span text:style-name="T1">Favoritos</text:span>: Se indica con una estrella en la cabecera principal de la fila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20:51:07.440894200</meta:creation-date>
    <dc:date>2026-05-04T20:51:44.389727500</dc:date>
    <meta:editing-duration>PT37S</meta:editing-duration>
    <meta:editing-cycles>1</meta:editing-cycles>
    <meta:document-statistic meta:table-count="0" meta:image-count="0" meta:object-count="0" meta:page-count="3" meta:paragraph-count="39" meta:word-count="545" meta:character-count="3354" meta:non-whitespace-character-count="2876"/>
    <meta:generator>LibreOffice/25.8.5.2$Windows_X86_64 LibreOffice_project/9c8b85f387cc00a89945a79c9e6239f32e450ac2</meta:generator>
  </office:meta>
</office:document-meta>
</file>